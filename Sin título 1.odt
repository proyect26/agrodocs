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65dd" officeooo:paragraph-rsid="001365dd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.159cm" style:contextual-spacing="false" fo:text-indent="0cm" style:auto-text-indent="false" fo:padding="0.049cm" fo:border="0.06pt solid #000000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8" style:family="paragraph" style:parent-style-name="Text_20_body" style:list-style-name="L4">
      <style:paragraph-properties fo:margin-left="0cm" fo:margin-right="0cm" fo:margin-top="0cm" fo:margin-bottom="0.159cm" style:contextual-spacing="false" fo:text-indent="0cm" style:auto-text-indent="false" fo:padding="0.049cm" fo:border="0.06pt solid #000000"/>
    </style:style>
    <style:style style:name="T1" style:family="text">
      <style:text-properties fo:font-weight="bold" loext:padding="0.049cm" loext:border="0.06pt solid #000000"/>
    </style:style>
    <style:style style:name="T2" style:family="text">
      <style:text-properties loext:padding="0.049cm" loext:border="0.06pt solid #000000"/>
    </style:style>
    <style:style style:name="T3" style:family="text">
      <style:text-properties style:font-name="Droid Sans Mono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Capas</text:span></text:span></text:p>
      <text:list text:style-name="L1">
        <text:list-item>
          <text:p text:style-name="P3"><text:span text:style-name="Strong_20_Emphasis"><text:span text:style-name="T1">Presentación UI</text:span></text:span>: React renderiza la interfaz y los componentes visuales. El arranque está en <text:span text:style-name="T2">src/main.jsx (line 1)</text:span> y la pantalla principal en <text:span text:style-name="T2">src/App.jsx (line 43)</text:span>.</text:p>
        </text:list-item>
        <text:list-item>
          <text:p text:style-name="P3"><text:span text:style-name="Strong_20_Emphasis"><text:span text:style-name="T1">Capa de aplicación / orquestación</text:span></text:span>: <text:span text:style-name="T3">App.jsx</text:span> coordina estados, formularios, lotes de impresión y navegación entre módulos. Desde ahí se montan los módulos de negocio: <text:span text:style-name="T3">DocumentsList</text:span>, <text:span text:style-name="T3">SuppliersControl</text:span>, <text:span text:style-name="T3">PaymentsRegistry</text:span>, <text:span text:style-name="T3">SettingsPanel</text:span> y otros en <text:span text:style-name="T2">src/App.jsx (line 1)</text:span>.</text:p>
        </text:list-item>
        <text:list-item>
          <text:p text:style-name="P3"><text:span text:style-name="Strong_20_Emphasis"><text:span text:style-name="T1">Puente seguro de escritorio</text:span></text:span>: <text:span text:style-name="T3">preload</text:span> expone una API controlada al frontend. Ahí se publica <text:span text:style-name="T3">window.desktop.dbQuery</text:span> en <text:span text:style-name="T2">electron/preload.cjs (line 3)</text:span>.</text:p>
        </text:list-item>
        <text:list-item>
          <text:p text:style-name="P3"><text:span text:style-name="Strong_20_Emphasis"><text:span text:style-name="T1">Capa de datos / main process</text:span></text:span>: Electron Main abre SQLite, crea tablas y ejecuta consultas. Eso vive en <text:span text:style-name="T2">electron/main.cjs (line 10)</text:span> y el handler IPC está en <text:span text:style-name="T2">electron/main.cjs (line 121)</text:span>.</text:p>
        </text:list-item>
        <text:list-item>
          <text:p text:style-name="P3"><text:span text:style-name="Strong_20_Emphasis"><text:span text:style-name="T1">Persistencia</text:span></text:span>: la base real se guarda en SQLite dentro de <text:span text:style-name="T3">userData</text:span>, y la app también usa <text:span text:style-name="T3">localStorage</text:span> como respaldo/fallback para algunos flujos.</text:p>
        </text:list-item>
      </text:list>
      <text:p text:style-name="P2"><text:span text:style-name="Strong_20_Emphasis"><text:span text:style-name="T1">Cómo fluye una operación</text:span></text:span></text:p>
      <text:list text:style-name="L2">
        <text:list-item>
          <text:p text:style-name="P5">El usuario hace algo en la UI, por ejemplo guardar un proveedor o imprimir.</text:p>
        </text:list-item>
        <text:list-item>
          <text:p text:style-name="P4">El componente React llama a la lógica de <text:span text:style-name="T3">App.jsx</text:span> o al módulo correspondiente.</text:p>
        </text:list-item>
        <text:list-item>
          <text:p text:style-name="P4">Si necesita persistencia, el frontend llama a <text:span text:style-name="T3">window.desktop.dbQuery(...)</text:span> expuesto por <text:span text:style-name="T3">preload</text:span>.</text:p>
        </text:list-item>
        <text:list-item>
          <text:p text:style-name="P4"><text:span text:style-name="T3">preload</text:span> reenvía la operación por IPC al proceso principal.</text:p>
        </text:list-item>
        <text:list-item>
          <text:p text:style-name="P4"><text:span text:style-name="T3">electron/main.cjs</text:span> recibe la consulta, la ejecuta contra SQLite y devuelve el resultado.</text:p>
        </text:list-item>
        <text:list-item>
          <text:p text:style-name="P5">El frontend actualiza el estado y la vista.</text:p>
        </text:list-item>
      </text:list>
      <text:p text:style-name="P2"><text:span text:style-name="Strong_20_Emphasis"><text:span text:style-name="T1">Tecnologías que usamos</text:span></text:span></text:p>
      <text:list text:style-name="L3">
        <text:list-item>
          <text:p text:style-name="P6"><text:span text:style-name="Strong_20_Emphasis"><text:span text:style-name="T1">Electron 37</text:span></text:span> para la app de escritorio: <text:span text:style-name="T2">package.json (line 29)</text:span></text:p>
        </text:list-item>
        <text:list-item>
          <text:p text:style-name="P6"><text:span text:style-name="Strong_20_Emphasis"><text:span text:style-name="T1">React 19</text:span></text:span> para la interfaz: <text:span text:style-name="T2">package.json (line 18)</text:span></text:p>
        </text:list-item>
        <text:list-item>
          <text:p text:style-name="P6"><text:span text:style-name="Strong_20_Emphasis"><text:span text:style-name="T1">Vite 8</text:span></text:span> para desarrollo y build frontend: <text:span text:style-name="T2">package.json (line 35)</text:span></text:p>
        </text:list-item>
        <text:list-item>
          <text:p text:style-name="P6"><text:span text:style-name="Strong_20_Emphasis"><text:span text:style-name="T1">SQLite integrado de Electron/Node</text:span></text:span> con <text:span text:style-name="T3">node:sqlite</text:span> para persistencia local: <text:span text:style-name="T2">electron/main.cjs (line 3)</text:span></text:p>
        </text:list-item>
        <text:list-item>
          <text:p text:style-name="P6"><text:span text:style-name="Strong_20_Emphasis"><text:span text:style-name="T1">electron-builder</text:span></text:span> para empaquetar la app: <text:span text:style-name="T2">package.json (line 30)</text:span></text:p>
        </text:list-item>
        <text:list-item>
          <text:p text:style-name="P6"><text:span text:style-name="Strong_20_Emphasis"><text:span text:style-name="T1">concurrently</text:span></text:span> y <text:span text:style-name="Strong_20_Emphasis"><text:span text:style-name="T1">wait-on</text:span></text:span> para desarrollo escritorio: <text:span text:style-name="T2">package.json (line 12)</text:span></text:p>
        </text:list-item>
        <text:list-item>
          <text:p text:style-name="P6"><text:span text:style-name="Strong_20_Emphasis"><text:span text:style-name="T1">lucide-react</text:span></text:span> para iconos: <text:span text:style-name="T2">package.json (line 17)</text:span></text:p>
        </text:list-item>
        <text:list-item>
          <text:p text:style-name="P6"><text:span text:style-name="Strong_20_Emphasis"><text:span text:style-name="T1">react-barcode</text:span></text:span> para códigos de barras: <text:span text:style-name="T2">package.json (line 19)</text:span></text:p>
        </text:list-item>
        <text:list-item>
          <text:p text:style-name="P6"><text:span text:style-name="Strong_20_Emphasis"><text:span text:style-name="T1">xlsx</text:span></text:span> para exportar reportes: <text:span text:style-name="T2">package.json (line 21)</text:span></text:p>
        </text:list-item>
      </text:list>
      <text:p text:style-name="P2"><text:span text:style-name="Strong_20_Emphasis"><text:span text:style-name="T1">Idea clave</text:span></text:span><text:line-break/>Esta app sigue una arquitectura de capas porque:</text:p>
      <text:list text:style-name="L4">
        <text:list-item>
          <text:p text:style-name="P8">la UI no accede directo a la base,</text:p>
        </text:list-item>
        <text:list-item>
          <text:p text:style-name="P8">la lógica de acceso a datos vive en el proceso principal,</text:p>
        </text:list-item>
        <text:list-item>
          <text:p text:style-name="P7"><text:soft-page-break/>el frontend solo habla con una API estrecha y segura (<text:span text:style-name="T3">dbQuery</text:span>),</text:p>
        </text:list-item>
        <text:list-item>
          <text:p text:style-name="P8">y la persistencia está desacoplada de la presentación.</text:p>
        </text:list-item>
      </text:list>
      <text:p text:style-name="Standard"/>
      <text:p text:style-name="Standard"/>
      <text:p text:style-name="P1">Diseño </text:p>
      <text:p text:style-name="P1">seguridad <text:s/></text:p>
      <text:p text:style-name="P1">validaci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2T10:01:40.471310391</meta:creation-date>
    <dc:date>2026-05-25T15:17:30.443236197</dc:date>
    <meta:editing-duration>P3DT5H5M20S</meta:editing-duration>
    <meta:editing-cycles>1</meta:editing-cycles>
    <meta:document-statistic meta:table-count="0" meta:image-count="0" meta:object-count="0" meta:page-count="2" meta:paragraph-count="31" meta:word-count="358" meta:character-count="2281" meta:non-whitespace-character-count="1975"/>
    <meta:generator>LibreOffice/24.2.7.2$Linux_X86_64 LibreOffice_project/420$Build-2</meta:generator>
  </office:meta>
</office:document-meta>
</file>